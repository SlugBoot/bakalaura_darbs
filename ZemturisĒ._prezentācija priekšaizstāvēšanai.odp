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1000000F71D77C308.png" manifest:media-type="image/png"/>
  <manifest:file-entry manifest:full-path="Pictures/10000001000003110000010F29EAD64B.png" manifest:media-type="image/png"/>
  <manifest:file-entry manifest:full-path="Pictures/10000001000002D3000000C9523A53D6.png" manifest:media-type="image/png"/>
  <manifest:file-entry manifest:full-path="Pictures/10000001000003EE0000025B2B157095.png" manifest:media-type="image/png"/>
  <manifest:file-entry manifest:full-path="Pictures/10000001000004770000013DF5BCEFB7.png" manifest:media-type="image/png"/>
  <manifest:file-entry manifest:full-path="Pictures/100000010000077E000001D5576EF127.png" manifest:media-type="image/png"/>
  <manifest:file-entry manifest:full-path="Pictures/100000010000034C0000030AEF379C9D.png" manifest:media-type="image/png"/>
  <manifest:file-entry manifest:full-path="Pictures/1000000100000480000002FD3C36DE50.png" manifest:media-type="image/png"/>
  <manifest:file-entry manifest:full-path="Pictures/100000010000019B000000E85CBD00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width="0.053cm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Virtuālās laboratorijas izveide ar tīmekļa tehnoloģijām</text:p>
            <text:p/>
            <text:p><text:span text:style-name="T1">Darba autors: Ēvalds Zemturis</text:span></text:p>
            <text:p><text:span text:style-name="T1">Darba vadītājs: Mg. oec. Gints Neiman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ktualitā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eaugoša nepieciešamība pēc attālinātas mācību vides</text:p>
                <text:p/>
              </text:list-item>
              <text:list-item>
                <text:p>Problēma: Esošie tehnoloģiskie risinājumi nav parocīgi izglītības iestādē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ērķis un uzdevum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zveidot integrētu sistēmu mācību procesam:</text:p>
                <text:list>
                  <text:list-item>
                    <text:p>Virtualizācijai</text:p>
                  </text:list-item>
                  <text:list-item>
                    <text:p>Piekļuvei</text:p>
                  </text:list-item>
                  <text:list-item>
                    <text:p>Automatizācijai</text:p>
                  </text:list-item>
                </text:list>
              </text:list-item>
              <text:list-item>
                <text:p>Galvenie uzdevumi: </text:p>
                <text:list>
                  <text:list-item>
                    <text:p>Portālu izveide un procesu automatizāci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hnoloģiskais ste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irtualizācijai – Proxmox</text:p>
              </text:list-item>
              <text:list-item>
                <text:p>Aizmugursistēmai – Spring Boot</text:p>
              </text:list-item>
              <text:list-item>
                <text:p>Piekļuvei – Guacamole</text:p>
              </text:list-item>
              <text:list-item>
                <text:p>Automatizācijai – Ansible</text:p>
              </text:list-item>
              <text:list-item>
                <text:p>Datubāzes sistēmai - PostgreSQ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utora veiku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Šī brīža arhitektūras diagramma</text:p>
              </text:list-item>
            </text:list>
          </draw:text-box>
        </draw:frame>
        <draw:frame draw:style-name="gr2" draw:text-style-name="P2" draw:layer="layout" svg:width="10.873cm" svg:height="6.137cm" svg:x="9.127cm" svg:y="5.863cm">
          <draw:image xlink:href="Pictures/100000010000019B000000E85CBD00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utora veikum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Šī brīža datubāzes ER diagramma</text:p>
              </text:list-item>
            </text:list>
          </draw:text-box>
        </draw:frame>
        <draw:frame draw:style-name="gr2" draw:text-style-name="P2" draw:layer="layout" svg:width="15.346cm" svg:height="10.191cm" svg:x="7cm" svg:y="5cm">
          <draw:image xlink:href="Pictures/1000000100000480000002FD3C36DE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utora veikum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sible “playbook”</text:p>
              </text:list-item>
            </text:list>
          </draw:text-box>
        </draw:frame>
        <draw:frame draw:style-name="gr2" draw:text-style-name="P2" draw:layer="layout" svg:width="12.5cm" svg:height="11.523cm" svg:x="13.5cm" svg:y="3.477cm">
          <draw:image xlink:href="Pictures/100000010000034C0000030AEF379C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utora veiku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uacamole pieslēgšanās</text:p>
              </text:list-item>
            </text:list>
          </draw:text-box>
        </draw:frame>
        <draw:frame draw:style-name="gr2" draw:text-style-name="P2" draw:layer="layout" svg:width="18.509cm" svg:height="4.53cm" svg:x="0.491cm" svg:y="4.97cm">
          <draw:image xlink:href="Pictures/100000010000077E000001D5576EF127.png" xlink:type="simple" xlink:show="embed" xlink:actuate="onLoad" draw:mime-type="image/png">
            <text:p/>
          </draw:image>
        </draw:frame>
        <draw:frame draw:style-name="gr2" draw:text-style-name="P2" draw:layer="layout" svg:width="14.182cm" svg:height="8.5cm" svg:x="13.818cm" svg:y="4.97cm">
          <draw:image xlink:href="Pictures/10000001000003EE0000025B2B1570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zultātu demonstrācija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2" draw:layer="layout" svg:width="27.999cm" svg:height="7.764cm" svg:x="0cm" svg:y="2.736cm">
          <draw:image xlink:href="Pictures/10000001000004770000013DF5BCEFB7.png" xlink:type="simple" xlink:show="embed" xlink:actuate="onLoad" draw:mime-type="image/png">
            <text:p/>
          </draw:image>
        </draw:frame>
        <draw:frame draw:style-name="gr4" draw:text-style-name="P2" draw:layer="layout" svg:width="19.125cm" svg:height="5.316cm" svg:x="0cm" svg:y="10.184cm">
          <draw:image xlink:href="Pictures/10000001000002D3000000C9523A53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zultātu demonstrācij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2" draw:layer="layout" svg:width="19.266cm" svg:height="6.65cm" svg:x="1cm" svg:y="2.5cm">
          <draw:image xlink:href="Pictures/10000001000003110000010F29EAD64B.png" xlink:type="simple" xlink:show="embed" xlink:actuate="onLoad" draw:mime-type="image/png">
            <text:p/>
          </draw:image>
        </draw:frame>
        <draw:frame draw:style-name="gr3" draw:text-style-name="P2" draw:layer="layout" svg:width="26.509cm" svg:height="5.84cm" svg:x="0.491cm" svg:y="9.16cm">
          <draw:image xlink:href="Pictures/1000000100000461000000F71D77C3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cinājumi un nākot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tomatizācija būtiski samazina darba vižu sagatavošanas laiku</text:p>
              </text:list-item>
              <text:list-item>
                <text:p><text:span text:style-name="T2">Priekšlikumi:</text:span> monitoringa integrācija, testu papildināšana, pilnveidota izstrāde, tehnoloģiju integrēšana sistēmā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aldies par uzmanību!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6:03:35.370552654</meta:creation-date>
    <dc:date>2026-04-19T16:58:50.486682081</dc:date>
    <meta:editing-duration>PT1H24M45S</meta:editing-duration>
    <meta:editing-cycles>10</meta:editing-cycles>
    <meta:generator>LibreOffice/25.8.6.2$Linux_X86_64 LibreOffice_project/987cc7d757da9c123ebd7e5fb357b53ea9182b29</meta:generator>
    <meta:document-statistic meta:object-count="76"/>
  </office:meta>
</office:document-meta>
</file>